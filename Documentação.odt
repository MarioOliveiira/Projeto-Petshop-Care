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D0000022061EFAC41.png" manifest:media-type="image/png"/>
  <manifest:file-entry manifest:full-path="Pictures/100000000000021D0000020510A262CC.png" manifest:media-type="image/png"/>
  <manifest:file-entry manifest:full-path="Pictures/100000000000017F000001600F1DBCA4.png" manifest:media-type="image/png"/>
  <manifest:file-entry manifest:full-path="Pictures/100000000000015C0000009B6727547D.png" manifest:media-type="image/png"/>
  <manifest:file-entry manifest:full-path="Pictures/10000000000002050000009842884B18.png" manifest:media-type="image/png"/>
  <manifest:file-entry manifest:full-path="Pictures/100000010000059400000504861A158C.png" manifest:media-type="image/png"/>
  <manifest:file-entry manifest:full-path="Pictures/1000000000000315000001457236F7B5.png" manifest:media-type="image/png"/>
  <manifest:file-entry manifest:full-path="Pictures/10000000000003B5000001B3E272DB1A.png" manifest:media-type="image/png"/>
  <manifest:file-entry manifest:full-path="Pictures/100000000000026F000001E6FC22B029.png" manifest:media-type="image/png"/>
  <manifest:file-entry manifest:full-path="Pictures/1000000000000102000001C060F1FDBD.png" manifest:media-type="image/png"/>
  <manifest:file-entry manifest:full-path="Pictures/10000000000004C3000001FABE8329E6.png" manifest:media-type="image/png"/>
  <manifest:file-entry manifest:full-path="Pictures/100000010000089A00000678EEF2C6B6.png" manifest:media-type="image/png"/>
  <manifest:file-entry manifest:full-path="Pictures/1000000000000109000000D1E68B136A.png" manifest:media-type="image/png"/>
  <manifest:file-entry manifest:full-path="Pictures/100000000000017D000001D0341BA0BB.png" manifest:media-type="image/png"/>
  <manifest:file-entry manifest:full-path="Pictures/100000000000021A0000010B47695652.png" manifest:media-type="image/png"/>
  <manifest:file-entry manifest:full-path="Pictures/100000000000034C00000224DF083E7E.png" manifest:media-type="image/png"/>
  <manifest:file-entry manifest:full-path="Pictures/100000000000019A000001614E5515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09d7" officeooo:paragraph-rsid="000c09d7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c09d7" style:font-size-asian="15pt" style:font-size-complex="15pt"/>
    </style:style>
    <style:style style:name="P3" style:family="paragraph" style:parent-style-name="Standard">
      <style:paragraph-properties fo:line-height="115%" fo:text-align="start" style:justify-single-word="false"/>
      <style:text-properties fo:font-size="15pt" officeooo:rsid="000c09d7" officeooo:paragraph-rsid="000c09d7" style:font-size-asian="15pt" style:font-size-complex="15pt"/>
    </style:style>
    <style:style style:name="P4" style:family="paragraph" style:parent-style-name="Standard">
      <style:paragraph-properties fo:line-height="115%" fo:text-align="center" style:justify-single-word="false"/>
      <style:text-properties fo:font-size="15pt" officeooo:rsid="000c09d7" officeooo:paragraph-rsid="000c09d7" style:font-size-asian="15pt" style:font-size-complex="15pt"/>
    </style:style>
    <style:style style:name="P5" style:family="paragraph" style:parent-style-name="Standard">
      <style:text-properties fo:font-size="13pt" officeooo:rsid="000c09d7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0c09d7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officeooo:rsid="000c09d7" officeooo:paragraph-rsid="000c09d7" style:font-size-asian="13pt" style:font-size-complex="13pt"/>
    </style:style>
    <style:style style:name="P8" style:family="paragraph" style:parent-style-name="Standard">
      <style:paragraph-properties fo:line-height="115%" fo:text-align="start" style:justify-single-word="false"/>
      <style:text-properties fo:font-size="13pt" officeooo:rsid="000c09d7" officeooo:paragraph-rsid="000c09d7" style:font-size-asian="13pt" style:font-size-complex="13pt"/>
    </style:style>
    <style:style style:name="P9" style:family="paragraph" style:parent-style-name="Standard">
      <style:paragraph-properties fo:line-height="115%" fo:text-align="start" style:justify-single-word="false"/>
      <style:text-properties fo:font-size="12pt" officeooo:rsid="000c09d7" officeooo:paragraph-rsid="000c09d7" style:font-size-asian="10.5pt" style:font-size-complex="12pt"/>
    </style:style>
    <style:style style:name="P10" style:family="paragraph" style:parent-style-name="Standard">
      <style:paragraph-properties fo:line-height="115%" fo:text-align="center" style:justify-single-word="false"/>
      <style:text-properties fo:font-size="12pt" officeooo:rsid="000c09d7" officeooo:paragraph-rsid="000c09d7" style:font-size-asian="10.5pt" style:font-size-complex="12pt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officeooo:rsid="000c09d7" officeooo:paragraph-rsid="000c09d7" style:font-size-asian="12pt" style:font-size-complex="12pt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officeooo:rsid="000c09d7" officeooo:paragraph-rsid="000df11c" style:font-size-asian="12pt" style:font-size-complex="12pt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officeooo:rsid="000c09d7" officeooo:paragraph-rsid="001839d8" style:font-size-asian="12pt" style:font-size-complex="12pt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officeooo:rsid="000c09d7" officeooo:paragraph-rsid="000c09d7" style:font-size-asian="12pt" style:font-size-complex="12pt"/>
    </style:style>
    <style:style style:name="P15" style:family="paragraph" style:parent-style-name="Standard">
      <style:paragraph-properties fo:line-height="115%" fo:text-align="center" style:justify-single-word="false"/>
      <style:text-properties fo:font-size="12pt" officeooo:rsid="000c09d7" officeooo:paragraph-rsid="000df11c" style:font-size-asian="12pt" style:font-size-complex="12pt"/>
    </style:style>
    <style:style style:name="P16" style:family="paragraph" style:parent-style-name="Standard">
      <style:paragraph-properties fo:line-height="115%" fo:text-align="center" style:justify-single-word="false"/>
      <style:text-properties fo:font-size="12pt" fo:font-weight="normal" officeooo:rsid="000c09d7" officeooo:paragraph-rsid="000df11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size="12pt" fo:font-weight="normal" officeooo:rsid="000c09d7" officeooo:paragraph-rsid="000df11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fo:font-weight="normal" officeooo:rsid="000f2ef8" officeooo:paragraph-rsid="000f2ef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fo:font-size="12pt" fo:font-weight="normal" officeooo:rsid="000f2ef8" officeooo:paragraph-rsid="000f2ef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size="12pt" fo:font-weight="normal" officeooo:rsid="0010c365" officeooo:paragraph-rsid="0010c36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size="12pt" fo:font-weight="normal" officeooo:rsid="0010c365" officeooo:paragraph-rsid="00131ae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fo:font-size="12pt" fo:font-weight="normal" officeooo:rsid="0010c365" officeooo:paragraph-rsid="000f2ef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fo:font-size="12pt" fo:font-weight="normal" officeooo:rsid="0010c365" officeooo:paragraph-rsid="0010c36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fo:font-size="12pt" fo:font-weight="normal" officeooo:rsid="0010c365" officeooo:paragraph-rsid="00131ae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center" style:justify-single-word="false"/>
      <style:text-properties fo:font-size="12pt" fo:font-weight="normal" officeooo:rsid="00131ae9" officeooo:paragraph-rsid="00131ae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size="12pt" fo:font-weight="normal" officeooo:rsid="00131ae9" officeooo:paragraph-rsid="00131ae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center" style:justify-single-word="false"/>
      <style:text-properties fo:font-size="12pt" fo:font-weight="normal" officeooo:rsid="00145ca7" officeooo:paragraph-rsid="00145ca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font-size="12pt" fo:font-weight="normal" officeooo:rsid="00145ca7" officeooo:paragraph-rsid="00145ca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size="12pt" fo:font-weight="normal" officeooo:rsid="0015fde8" officeooo:paragraph-rsid="0015fde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fo:font-size="12pt" fo:font-weight="normal" officeooo:rsid="001659d9" officeooo:paragraph-rsid="001659d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font-size="12pt" fo:font-weight="normal" officeooo:rsid="001659d9" officeooo:paragraph-rsid="001659d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center" style:justify-single-word="false"/>
      <style:text-properties fo:font-size="12pt" fo:font-weight="normal" officeooo:rsid="0016c0e5" officeooo:paragraph-rsid="0016c0e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font-size="12pt" fo:font-weight="normal" officeooo:rsid="0016c0e5" officeooo:paragraph-rsid="0016c0e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font-size="12pt" fo:font-weight="normal" officeooo:rsid="00171b19" officeooo:paragraph-rsid="00171b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fo:font-size="12pt" fo:font-weight="normal" officeooo:rsid="001839d8" officeooo:paragraph-rsid="001839d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fo:font-size="14pt" officeooo:rsid="000c09d7" officeooo:paragraph-rsid="000c09d7" style:font-size-asian="12.25pt" style:font-size-complex="14pt"/>
    </style:style>
    <style:style style:name="P37" style:family="paragraph" style:parent-style-name="Standard">
      <style:paragraph-properties fo:line-height="115%" fo:text-align="center" style:justify-single-word="false"/>
      <style:text-properties fo:font-size="14pt" fo:font-weight="normal" officeooo:rsid="000f2ef8" officeooo:paragraph-rsid="000f2e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fo:font-size="14pt" fo:font-weight="normal" officeooo:rsid="0010c365" officeooo:paragraph-rsid="0010c36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center" style:justify-single-word="false"/>
      <style:text-properties fo:font-size="14pt" fo:font-weight="normal" officeooo:rsid="00131ae9" officeooo:paragraph-rsid="00131ae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fo:font-size="12pt" fo:font-weight="normal" officeooo:rsid="0016c0e5" officeooo:paragraph-rsid="0016c0e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line-height="115%" fo:text-align="center" style:justify-single-word="false"/>
      <style:text-properties fo:font-size="14pt" fo:font-weight="normal" officeooo:rsid="00131ae9" officeooo:paragraph-rsid="00131ae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fo:font-size="14pt" fo:font-weight="normal" officeooo:rsid="001cdced" officeooo:paragraph-rsid="001cdced" style:font-size-asian="14pt" style:font-weight-asian="normal" style:font-size-complex="14pt" style:font-weight-complex="normal"/>
    </style:style>
    <style:style style:name="T1" style:family="text">
      <style:text-properties officeooo:rsid="00131ae9"/>
    </style:style>
    <style:style style:name="T2" style:family="text">
      <style:text-properties officeooo:rsid="0015fde8"/>
    </style:style>
    <style:style style:name="T3" style:family="text">
      <style:text-properties officeooo:rsid="00171b19"/>
    </style:style>
    <style:style style:name="T4" style:family="text">
      <style:text-properties officeooo:rsid="001839d8"/>
    </style:style>
    <style:style style:name="T5" style:family="text">
      <style:text-properties officeooo:rsid="001a03b1"/>
    </style:style>
    <style:style style:name="T6" style:family="text">
      <style:text-properties officeooo:rsid="001b21ea"/>
    </style:style>
    <style:style style:name="T7" style:family="text">
      <style:text-properties officeooo:rsid="001cdc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5" draw:name="Figura1" text:anchor-type="char" svg:x="5.563cm" svg:y="0.222cm" svg:width="6.138cm" svg:height="2.734cm" draw:z-index="0"><draw:image xlink:href="Pictures/100000000000015C0000009B6727547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Petshop com atendimento</text:p>
      <text:p text:style-name="P5"/>
      <text:p text:style-name="P5"/>
      <text:p text:style-name="P5">Mario Carneiro Oliveira </text:p>
      <text:p text:style-name="P5">Banco de Dados I | Turma: ESW-NOT-PIT-3S-T1</text:p>
      <text:p text:style-name="P5"/>
      <text:p text:style-name="P5"/>
      <text:p text:style-name="P6">Escola de Tecnologias</text:p>
      <text:p text:style-name="P6">Universidade Católica do Salvador (UCSAL)</text:p>
      <text:p text:style-name="P6">Av. Prof. Pinto de Aguiar, 2589 Pituaçu, CEP: 41740-090</text:p>
      <text:p text:style-name="P6">Salvador/BA, Brasil</text:p>
      <text:p text:style-name="P6"/>
      <text:p text:style-name="P6">Junho 2026</text:p>
      <text:p text:style-name="P6"/>
      <text:p text:style-name="P1">Resumo</text:p>
      <text:p text:style-name="P7"/>
      <text:p text:style-name="P11">O projeto atual tem como objetivo mostrar o funcionamento de um banco de dados</text:p>
      <text:p text:style-name="P11">de um petshop, <text:span text:style-name="T4">criado</text:span> como uma atividade prática para a disciplina de Banco</text:p>
      <text:p text:style-name="P11">de Dados I. Ele busca demonstrar os conhecimentos obtidos através da disciplina,</text:p>
      <text:p text:style-name="P11">além disso, demonstra como funciona um Sistema de Petshop com a linguagem</text:p>
      <text:p text:style-name="P11">Java juntamente com o SGBD PostgreSQL através do JDBC. O sistema possui</text:p>
      <text:p text:style-name="P11">funcionalidades como o cadastro de clientes, pets, produtos, além de atendimentos</text:p>
      <text:p text:style-name="P11">com serviços como banho, tosa, e também compra de produtos. O projeto trabalha</text:p>
      <text:p text:style-name="P11">com operações CRUD, uso de recursos do banco, como views, functions e procedures.</text:p>
      <text:p text:style-name="P8"/>
      <text:p text:style-name="P4">Introdução</text:p>
      <text:p text:style-name="P3"/>
      <text:p text:style-name="P9"><text:span text:style-name="T5">Projeto criado para o</text:span> desenvolvimento de um sistema de petshop com atendimento, proposto como atividade avaliativa para 2ª unidade da matéria de Banco de Dados. O principal objetivo é aplicar os conhecimentos adquiridos sobre criação do banco de dados e modelagem de banco de dados e integração com linguagens de programação, utilizando como base o SGBD PostgreSQL e a linguagem Java com JDBC.</text:p>
      <text:p text:style-name="P9"/>
      <text:p text:style-name="P9">O sistema permite o cadastro de clientes, animais, pets, cadastro de produtos e serviços. A estrutura do projeto foi elaborada de forma simples, incluindo o uso de views, functions, procedures, joins e constraints como primary key, foreign key.</text:p>
      <text:p text:style-name="P9"/>
      <text:p text:style-name="P9"><text:soft-page-break/>Com entidades como — Cliente, Produto, Pet e Animal, atendimento, serviço — o sistema simula cenários onde o cliente possa fazer uma compra de um ou mais produtos, e também fazer um serviço através de um atendimento, reforçando o aprendizado de conceitos fundamentais como modelagem conceitual e lógica, operações CRUD.</text:p>
      <text:p text:style-name="P9"/>
      <text:p text:style-name="P10"/>
      <text:p text:style-name="P36">Modelo conceitual petshop</text:p>
      <text:p text:style-name="P36"/>
      <text:p text:style-name="P9">O modelo conceitual do petshop foi desenvolvido para representar as principais operações de um petshop. As entidades foram organizadas em grupos de cadastro, operações e controle. As entidades de cadastro armazenam informações de clientes, pets, produtos, serviços, empregados e fornecedores. Já as entidades de operação registram atendimentos e pedidos realizados. Por fim, entidades de apoio e controle são responsáveis pelo gerenciamento de estoque, telefones, endereços e relacionamentos entre outros registros.</text:p>
      <text:p text:style-name="P9"/>
      <text:p text:style-name="P10"><draw:frame draw:style-name="fr4" draw:name="Figura2" text:anchor-type="char" svg:width="17cm" svg:height="15.286cm" draw:z-index="1"><draw:image xlink:href="Pictures/100000010000059400000504861A158C.png" xlink:type="simple" xlink:show="embed" xlink:actuate="onLoad" draw:mime-type="image/png"/></draw:frame>Figura 1 – Diagrama Modelo Conceitual</text:p>
      <text:p text:style-name="P10"/>
      <text:p text:style-name="P10"/>
      <text:p text:style-name="P36"><text:soft-page-break/></text:p>
      <text:p text:style-name="P36">Modelo lógico do Petshop</text:p>
      <text:p text:style-name="P36"/>
      <text:p text:style-name="P11">O modelo lógico do Petshop representa a estrutura detalhada das tabelas no banco de dados relacional, com os tipos de dados, chaves primárias, estrangeiras e restrições aplicadas.</text:p>
      <text:p text:style-name="P11">Esse modelo organiza logicamente as entidades do sistema e seus vínculos, servindo de base para a implementação física no banco de dados.</text:p>
      <text:p text:style-name="P11"/>
      <text:p text:style-name="P11"/>
      <text:p text:style-name="P11"/>
      <text:p text:style-name="P11"/>
      <text:p text:style-name="P11"><draw:frame draw:style-name="fr3" draw:name="Figura3" text:anchor-type="char" svg:width="17cm" svg:height="12.785cm" draw:z-index="2"><draw:image xlink:href="Pictures/100000010000089A00000678EEF2C6B6.png" xlink:type="simple" xlink:show="embed" xlink:actuate="onLoad" draw:mime-type="image/png"/></draw:frame></text:p>
      <text:p text:style-name="P14">Figura 2 – Diagrama Modelo Lógico</text:p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tab/><text:tab/><text:tab/></text:p>
      <text:p text:style-name="P15"><text:soft-page-break/></text:p>
      <text:p text:style-name="P15"><text:tab/><text:tab/><text:tab/><text:tab/><text:tab/><text:tab/><text:tab/><text:tab/><draw:frame draw:style-name="fr5" draw:name="Figura4" text:anchor-type="char" svg:x="5.128cm" svg:y="0.035cm" svg:width="7.01cm" svg:height="5.53cm" draw:z-index="3"><draw:image xlink:href="Pictures/1000000000000109000000D1E68B136A.png" xlink:type="simple" xlink:show="embed" xlink:actuate="onLoad" draw:mime-type="image/png"/></draw:frame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igura 3 – Script CREATE DATABASE</text:p>
      <text:p text:style-name="P15"/>
      <text:p text:style-name="P13">A Figura 3 ilustra a estrutura utilizada para desenvolver o script de criação do banco</text:p>
      <text:p text:style-name="P13">no PostgreSQL.</text:p>
      <text:p text:style-name="P12"/>
      <text:p text:style-name="P12"/>
      <text:p text:style-name="P12"/>
      <text:p text:style-name="P12"><draw:frame draw:style-name="fr5" draw:name="Figura5" text:anchor-type="char" svg:x="3.99cm" svg:y="0.002cm" svg:width="9.075cm" svg:height="11.053cm" draw:z-index="4"><draw:image xlink:href="Pictures/100000000000017D000001D0341BA0B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Figura 4 – Script CREATE TABLE</text:p>
      <text:p text:style-name="P15"/>
      <text:p text:style-name="P13"><text:span text:style-name="T4">Na </text:span>Figura 4, <text:span text:style-name="T2">está</text:span> o script responsável pela criação das tabelas no</text:p>
      <text:p text:style-name="P13">banco de dados PostgreSQL.</text:p>
      <text:p text:style-name="P16"><draw:frame draw:style-name="fr2" draw:name="Figura6" text:anchor-type="char" svg:width="17cm" svg:height="7.791cm" draw:z-index="5"><draw:image xlink:href="Pictures/10000000000003B5000001B3E272DB1A.png" xlink:type="simple" xlink:show="embed" xlink:actuate="onLoad" draw:mime-type="image/png"/></draw:frame><text:soft-page-break/>Figura 5 – Script INSERT INTO ... VALUES</text:p>
      <text:p text:style-name="P16"/>
      <text:p text:style-name="P16"/>
      <text:p text:style-name="P13">Na Figura 5, podemos verificar o script com os comandos de INSERT INTO (...) VALUES</text:p>
      <text:p text:style-name="P13">(...); para inserir dados <text:span text:style-name="T4">de teste</text:span> através do SGBD PostgreSQL no banco de dados.</text:p>
      <text:p text:style-name="P17"/>
      <text:p text:style-name="P37">Programação utilizando Java</text:p>
      <text:p text:style-name="P37"/>
      <text:p text:style-name="P18">O Sistema do Petshop foi desenvolvido com a utilização da linguagem de programação Java, utilizando o IntelliJ como IDE (Integrated Development Environment) ou ambiente de desenvolvimento integrado para fazer conexão e comunicação entre a aplicação e o banco através da API JDBC (Java Database Connectivity) que permite a execução de operações SQL diretamente a partir do código Java.</text:p>
      <text:p text:style-name="P18"/>
      <text:p text:style-name="P19"><draw:frame draw:style-name="fr1" draw:name="Figura7" text:anchor-type="char" svg:width="13.677cm" svg:height="4.022cm" draw:z-index="16"><draw:image xlink:href="Pictures/10000000000002050000009842884B18.png" xlink:type="simple" xlink:show="embed" xlink:actuate="onLoad" draw:mime-type="image/png"/></draw:frame>Figura 6 – Classe em Java para estabelecer Conexão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9"/>
      <text:p text:style-name="P39"/>
      <text:p text:style-name="P39"><text:soft-page-break/>MENU</text:p>
      <text:p text:style-name="P39"/>
      <text:p text:style-name="P39"><draw:frame draw:style-name="fr3" draw:name="Figura9" text:anchor-type="char" svg:width="14.233cm" svg:height="7.063cm" draw:z-index="6"><draw:image xlink:href="Pictures/100000000000021A0000010B47695652.png" xlink:type="simple" xlink:show="embed" xlink:actuate="onLoad" draw:mime-type="image/png"/></draw:frame></text:p>
      <text:p text:style-name="P42">Menu que irá ser mostrado para as operações.</text:p>
      <text:p text:style-name="P42"/>
      <text:p text:style-name="P42"/>
      <text:p text:style-name="P38">CRUD</text:p>
      <text:p text:style-name="P20"/>
      <text:p text:style-name="P20">Inserção de dados</text:p>
      <text:p text:style-name="P20"><draw:frame draw:style-name="fr5" draw:name="Figura8" text:anchor-type="char" svg:x="5.195cm" svg:y="0.136cm" svg:width="6.824cm" svg:height="11.852cm" draw:z-index="7"><draw:image xlink:href="Pictures/1000000000000102000001C060F1FDBD.png" xlink:type="simple" xlink:show="embed" xlink:actuate="onLoad" draw:mime-type="image/png"/></draw:frame></text:p>
      <text:p text:style-name="P20"/>
      <text:p text:style-name="P23"/>
      <text:p text:style-name="P20"/>
      <text:p text:style-name="P20"/>
      <text:p text:style-name="P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Figura 7 – INSERT em Java</text:p>
      <text:p text:style-name="P24"><text:soft-page-break/></text:p>
      <text:p text:style-name="P21">Na figura 7, podemos ver o metodo inserir, que quando executado, <text:span text:style-name="T1">pede os dados para serem gravados no banco de dados.</text:span></text:p>
      <text:p text:style-name="P21"/>
      <text:p text:style-name="P25"><draw:frame draw:style-name="fr3" draw:name="Figura10" text:anchor-type="char" svg:width="16.482cm" svg:height="12.857cm" draw:z-index="8"><draw:image xlink:href="Pictures/100000000000026F000001E6FC22B029.png" xlink:type="simple" xlink:show="embed" xlink:actuate="onLoad" draw:mime-type="image/png"/></draw:frame>Figura 8 – busca de dados</text:p>
      <text:p text:style-name="P25"/>
      <text:p text:style-name="P26">A figura 8 representa a solicitação de dados de todos os clientes cadastrados no banco de dados.</text:p>
      <text:p text:style-name="P27"><draw:frame draw:style-name="fr5" draw:name="Figura11" text:anchor-type="char" svg:x="0.494cm" svg:y="0.185cm" svg:width="15.646cm" svg:height="10.158cm" draw:z-index="9"><draw:image xlink:href="Pictures/100000000000034C00000224DF083E7E.png" xlink:type="simple" xlink:show="embed" xlink:actuate="onLoad" draw:mime-type="image/png"/></draw:frame><text:soft-page-break/>Figura 9- Update produto</text:p>
      <text:p text:style-name="P27"/>
      <text:p text:style-name="P28">Na figura 9, quando executado, atualiza dados de uma entidade já cadastrada.</text:p>
      <text:p text:style-name="P28"/>
      <text:p text:style-name="P27"><draw:frame draw:style-name="fr2" draw:name="Figura12" text:anchor-type="char" svg:width="17cm" svg:height="7.056cm" draw:z-index="10"><draw:image xlink:href="Pictures/10000000000004C3000001FABE8329E6.png" xlink:type="simple" xlink:show="embed" xlink:actuate="onLoad" draw:mime-type="image/png"/></draw:frame>Figura 10 – Delete</text:p>
      <text:p text:style-name="P28"/>
      <text:p text:style-name="P28">Na figura 10, foi executado um delete de um pet, entretan<text:span text:style-name="T5">t</text:span>o, não foi possível excluir, pois <text:span text:style-name="T5">o pet está em relação com a entidade atendimento</text:span>, mostrando em ação a constraint “ON DELETE RESTRICT”.</text:p>
      <text:p text:style-name="P28"/>
      <text:p text:style-name="P28"/>
      <text:p text:style-name="P28"/>
      <text:p text:style-name="P28"/>
      <text:p text:style-name="P28"/>
      <text:p text:style-name="P27"><text:soft-page-break/><text:s/><text:tab/><text:tab/><draw:frame draw:style-name="fr1" draw:name="Figura13" text:anchor-type="char" svg:width="10.846cm" svg:height="9.338cm" draw:z-index="11"><draw:image xlink:href="Pictures/100000000000019A000001614E5515A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Figura 11 – VIEW<text:span text:style-name="T4">(java)</text:span></text:p>
      <text:p text:style-name="P27"/>
      <text:p text:style-name="P28">Na figura 11, é mostrado um relatório de atendimento de clientes, onde mostra o nome do cliente, o nome do pet, o serviço fornecido e também o valor.</text:p>
      <text:p text:style-name="P28"/>
      <text:p text:style-name="P27"><draw:frame draw:style-name="fr1" draw:name="Figura14" text:anchor-type="char" svg:width="10.132cm" svg:height="9.312cm" draw:z-index="12"><draw:image xlink:href="Pictures/100000000000017F000001600F1DBCA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2">Figura 12 – JOIN (Java)</text:span></text:p>
      <text:p text:style-name="P27"/>
      <text:p text:style-name="P29">Na figura 12, é gerado um relatório dos pedidos feitos por todos os clientes, contendo seu nome, o produto comprado, e o valor total.</text:p>
      <text:p text:style-name="P29"/>
      <text:p text:style-name="P29"/>
      <text:p text:style-name="P30"><draw:frame draw:style-name="fr4" draw:name="Figura15" text:anchor-type="char" svg:width="17cm" svg:height="7.001cm" draw:z-index="13"><draw:image xlink:href="Pictures/1000000000000315000001457236F7B5.png" xlink:type="simple" xlink:show="embed" xlink:actuate="onLoad" draw:mime-type="image/png"/></draw:frame><text:soft-page-break/>Figura 13 – Constraint entidade associativa</text:p>
      <text:p text:style-name="P30"/>
      <text:p text:style-name="P31">Na criação das tabelas e inclusão de constraints, no sistema do petshop as entidades associativas não possuem restrição e podem ser excluidas a qualquer momento, pois elas servem para conectar umas com as outras, porém em uma entidade normal a constraint é restrita, como ocorreu na figura 10, entidade com valores próprios não podem ser excluidas pois possuem valores independentes, e futuramente podem servir como relatório, por exemplo.</text:p>
      <text:p text:style-name="P31"/>
      <text:p text:style-name="P30"><draw:frame draw:style-name="fr3" draw:name="Figura16" text:anchor-type="char" svg:width="12.938cm" svg:height="12.365cm" draw:z-index="14"><draw:image xlink:href="Pictures/100000000000021D0000020510A262C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Figura 14 – Function</text:p>
      <text:p text:style-name="P30"/>
      <text:p text:style-name="P31"><text:soft-page-break/>Na figura 14, foi criada uma Function que tem como objetivo realizar a soma de todas as vendas realizadas no sistema.</text:p>
      <text:p text:style-name="P31"/>
      <text:p text:style-name="P32"><draw:frame draw:style-name="fr2" draw:name="Figura17" text:anchor-type="char" svg:width="17cm" svg:height="10.545cm" draw:z-index="15"><draw:image xlink:href="Pictures/100000000000036D0000022061EFAC41.png" xlink:type="simple" xlink:show="embed" xlink:actuate="onLoad" draw:mime-type="image/png"/></draw:frame>Figura 15 – Procedure</text:p>
      <text:p text:style-name="P32"/>
      <text:p text:style-name="P33">Na figura 15, foi criada uma Procedure, onde a cada compra de um produto for realizada, o estoque do produto é automaticamente atualizad<text:span text:style-name="T7">o</text:span>.</text:p>
      <text:p text:style-name="P33"/>
      <text:p text:style-name="P32"><text:tab/><text:span text:style-name="T3">CONCLUSÃO</text:span></text:p>
      <text:p text:style-name="P32"/>
      <text:p text:style-name="P34">A Criação do Petshop foi um desafio bem grande, forneceu aprendizados sem comparações, na linguagem de SQL (com postgreSQL), os principais métodos de operação, como inclusão, alteração, exclusão, <text:span text:style-name="T4">como as constraints funcionam com a segurança de dados sensíveis,</text:span> e um aprendizado ainda maior com a linguagem Java, entendendo como funciona o JDBC e principalmente, entendendo como funciona POO na prática, algo que pessoalmente ainda não <text:span text:style-name="T4">tinha tido a</text:span> experiencia, por conta disso, foi uma caminhada mais longa. Assim como o aprendizado nos modelos conceituais e lógicos, que foram a base sólida para a criação do sistema, entender como cada entidade iria funcionar foi um conhecimento valioso.</text:p>
      <text:p text:style-name="P35">Ainda assim, o sistema ainda pode obter várias melhorias, CRUD de todas as entidades criadas, criar um interface além do terminal, e também expandir o sistema com as outras entidades, <text:span text:style-name="T6">como fornecedor, endereço, telefone</text:span>, que no momento serviram como apoio.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7T03:00:55.864255017</meta:creation-date>
    <dc:date>2026-06-08T04:19:38.856324810</dc:date>
    <meta:editing-duration>PT43M27S</meta:editing-duration>
    <meta:editing-cycles>6</meta:editing-cycles>
    <meta:generator>LibreOffice/24.2.7.2$Linux_X86_64 LibreOffice_project/420$Build-2</meta:generator>
    <meta:document-statistic meta:table-count="0" meta:image-count="17" meta:object-count="0" meta:page-count="11" meta:paragraph-count="67" meta:word-count="1011" meta:character-count="6593" meta:non-whitespace-character-count="5436"/>
  </office:meta>
</office:document-meta>
</file>